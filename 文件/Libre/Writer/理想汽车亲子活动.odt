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思源宋体" svg:font-family="思源宋体" style:font-family-generic="system" style:font-pitch="variable"/>
    <style:font-face style:name="思源黑体" svg:font-family="思源黑体"/>
    <style:font-face style:name="思源黑体1" svg:font-family="思源黑体" style:font-family-generic="system" style:font-pitch="variable"/>
  </office:font-face-decls>
  <office:automatic-styles>
    <style:style style:name="表格1" style:family="table">
      <style:table-properties style:width="10.605cm" table:align="left"/>
    </style:style>
    <style:style style:name="表格1.A" style:family="table-column">
      <style:table-column-properties style:column-width="1.695cm"/>
    </style:style>
    <style:style style:name="表格1.B" style:family="table-column">
      <style:table-column-properties style:column-width="8.909cm"/>
    </style:style>
    <style:style style:name="表格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.2" style:family="table-row">
      <style:table-row-properties style:min-row-height="1.108cm"/>
    </style:style>
    <style:style style:name="P1" style:family="paragraph" style:parent-style-name="Heading_20_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f9fafb" loext:opacity="100%" fo:letter-spacing="normal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fo:orphans="2" fo:widows="2" fo:text-indent="0cm" style:auto-text-indent="false"/>
      <style:text-properties fo:font-variant="normal" fo:text-transform="none" fo:color="#f9fafb" loext:opacity="100%" fo:letter-spacing="normal" style:font-name-asian="quote-cjk-patch" style:font-style-asian="normal" style:font-weight-asian="normal"/>
    </style:style>
    <style:style style:name="P3" style:family="paragraph" style:parent-style-name="Table_20_Heading">
      <style:paragraph-properties fo:margin-left="0cm" fo:margin-right="0cm" fo:text-align="left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117448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rsid="00117448" officeooo:paragraph-rsid="00117448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f9fafb" loext:opacity="100%" fo:letter-spacing="normal" style:font-name-asian="quote-cjk-patch" style:font-size-asian="12pt" style:font-style-asian="normal" style:font-weight-asian="normal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f9fafb" loext:opacity="100%" fo:letter-spacing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9fafb" loext:opacity="100%" fo:letter-spacing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9fafb" loext:opacity="100%" fo:letter-spacing="normal" style:font-name-asian="quote-cjk-patch" style:font-size-asian="12pt" style:font-style-asian="normal" style:font-weight-asian="normal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style:font-name-asian="quote-cjk-patch" style:font-style-asian="normal" style:font-weight-asian="normal"/>
    </style:style>
    <style:style style:name="T2" style:family="text">
      <style:text-properties style:font-name="quote-cjk-patch" fo:font-style="normal" fo:font-weight="normal"/>
    </style:style>
    <style:style style:name="T3" style:family="text">
      <style:text-properties fo:font-variant="normal" fo:text-transform="none" fo:color="#f9fafb" loext:opacity="100%" fo:letter-spacing="normal" style:font-name-asian="quote-cjk-patch" style:font-style-asian="normal" style:font-weight-asian="normal"/>
    </style:style>
    <style:style style:name="T4" style:family="text">
      <style:text-properties fo:font-variant="normal" fo:text-transform="none" fo:color="#f9fafb" loext:opacity="100%" style:font-name="quote-cjk-patch" fo:letter-spacing="normal" fo:font-style="normal" fo:font-weight="normal"/>
    </style:style>
    <style:style style:name="T5" style:family="text">
      <style:text-properties officeooo:rsid="00117448"/>
    </style:style>
    <style:style style:name="T6" style:family="text">
      <style:text-properties fo:font-variant="normal" fo:text-transform="none" fo:color="#f9fafb" loext:opacity="100%" fo:letter-spacing="normal" style:font-name-asian="quote-cjk-patch" style:font-size-asian="12pt" style:font-style-asian="normal" style:font-weight-asian="bold"/>
    </style:style>
    <style:style style:name="T7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8" style:family="text">
      <style:text-properties style:font-name-asian="quote-cjk-patch" style:font-size-asian="12pt" style:font-style-asian="normal" style:font-weight-asian="normal"/>
    </style:style>
    <style:style style:name="T9" style:family="text">
      <style:text-properties style:font-name="quote-cjk-patch" fo:font-size="12pt" fo:font-style="normal" fo:font-weight="normal"/>
    </style:style>
    <style:style style:name="T10" style:family="text">
      <style:text-properties fo:font-variant="normal" fo:text-transform="none" fo:color="#f9fafb" loext:opacity="100%" fo:letter-spacing="normal" style:font-name-asian="quote-cjk-patch" style:font-size-asian="12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【</text:span><text:bookmark-start text:name="__DdeLink__0_346892543"/><text:span text:style-name="T1">理想汽车</text:span><text:span text:style-name="T2">·小海狸木工坊</text:span><text:bookmark-end text:name="__DdeLink__0_346892543"/><text:span text:style-name="T1">】亲子木工体验</text:span></text:h>
      <text:h text:style-name="P2" text:outline-level="2">一、活动概况</text:h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3">项目</text:p>
            </table:table-cell>
            <table:table-cell table:style-name="表格1.A1" office:value-type="string">
              <text:p text:style-name="P3">内容</text:p>
            </table:table-cell>
          </table:table-row>
        </table:table-header-rows>
        <table:table-row table:style-name="表格1.2">
          <table:table-cell table:style-name="表格1.A1" office:value-type="string">
            <text:p text:style-name="P4">活动主题</text:p>
          </table:table-cell>
          <table:table-cell table:style-name="表格1.A1" office:value-type="string">
            <text:p text:style-name="P5"><text:span text:style-name="T3">理想汽车</text:span><text:span text:style-name="T4">·小海狸木工坊</text:span> —— 亲子木工体验</text:p>
          </table:table-cell>
        </table:table-row>
        <table:table-row>
          <table:table-cell table:style-name="表格1.A1" office:value-type="string">
            <text:p text:style-name="P4">活动地点</text:p>
          </table:table-cell>
          <table:table-cell table:style-name="表格1.A1" office:value-type="string">
            <text:p text:style-name="P5">小海狸木工坊（室内）</text:p>
          </table:table-cell>
        </table:table-row>
        <table:table-row>
          <table:table-cell table:style-name="表格1.A1" office:value-type="string">
            <text:p text:style-name="P5">活动日期</text:p>
          </table:table-cell>
          <table:table-cell table:style-name="表格1.A1" office:value-type="string">
            <text:p text:style-name="P6">2026年06月27日</text:p>
          </table:table-cell>
        </table:table-row>
        <table:table-row>
          <table:table-cell table:style-name="表格1.A1" office:value-type="string">
            <text:p text:style-name="P5">活动时长</text:p>
          </table:table-cell>
          <table:table-cell table:style-name="表格1.A1" office:value-type="string">
            <text:p text:style-name="P4">3小时</text:p>
          </table:table-cell>
        </table:table-row>
        <table:table-row>
          <table:table-cell table:style-name="表格1.A1" office:value-type="string">
            <text:p text:style-name="P4">参与对象</text:p>
          </table:table-cell>
          <table:table-cell table:style-name="表格1.A1" office:value-type="string">
            <text:p text:style-name="P4">3-12岁小朋友（需家长陪同）</text:p>
          </table:table-cell>
        </table:table-row>
        <table:table-row>
          <table:table-cell table:style-name="表格1.A1" office:value-type="string">
            <text:p text:style-name="P4">参与人数</text:p>
          </table:table-cell>
          <table:table-cell table:style-name="表格1.A1" office:value-type="string">
            <text:p text:style-name="Table_20_Contents">1<text:span text:style-name="T5">0</text:span>组家庭（每组一大一小或两大一小）</text:p>
          </table:table-cell>
        </table:table-row>
      </table:table>
      <text:h text:style-name="P2" text:outline-level="2">收费标准<text:span text:style-name="T5">：</text:span></text:h>
      <text:h text:style-name="P2" text:outline-level="2">二、活动流程</text:h>
      <text:p text:style-name="P7"><text:span text:style-name="Strong_20_Emphasis"><text:span text:style-name="T6">第</text:span></text:span><text:span text:style-name="Strong_20_Emphasis"><text:span text:style-name="T7">1</text:span></text:span><text:span text:style-name="Strong_20_Emphasis"><text:span text:style-name="T6">小时 </text:span></text:span><text:span text:style-name="Strong_20_Emphasis"><text:span text:style-name="T7">· </text:span></text:span><text:span text:style-name="Strong_20_Emphasis"><text:span text:style-name="T6">认识木工 </text:span></text:span><text:span text:style-name="Strong_20_Emphasis"><text:span text:style-name="T7">&amp; </text:span></text:span><text:span text:style-name="Strong_20_Emphasis"><text:span text:style-name="T6">设计绘图</text:span></text:span></text:p>
      <text:p text:style-name="P8">签到入场，领取围裙、护目镜等防护装备。由木工老师带领参观工坊，认识基础工具（锤子、砂纸、手锯等），讲解安全注意事项。随后进入设计环节，小朋友在家长协助下，在木料上绘制自己心仪的小汽车外形草图（可提供几种基础车型模板供参考选择）。</text:p>
      <text:p text:style-name="P7"><text:span text:style-name="Strong_20_Emphasis"><text:span text:style-name="T6">第</text:span></text:span><text:span text:style-name="Strong_20_Emphasis"><text:span text:style-name="T7">2</text:span></text:span><text:span text:style-name="Strong_20_Emphasis"><text:span text:style-name="T6">小时 </text:span></text:span><text:span text:style-name="Strong_20_Emphasis"><text:span text:style-name="T7">· </text:span></text:span><text:span text:style-name="Strong_20_Emphasis"><text:span text:style-name="T6">切割打磨 </text:span></text:span><text:span text:style-name="Strong_20_Emphasis"><text:span text:style-name="T7">&amp; </text:span></text:span><text:span text:style-name="Strong_20_Emphasis"><text:span text:style-name="T6">组装成型</text:span></text:span></text:p>
      <text:p text:style-name="P9"><text:span text:style-name="T8">在老师指导下，家长协助小朋友进行基础的切割、打磨、钻孔等操作（根据年龄分层：</text:span><text:span text:style-name="T9">3-6</text:span><text:span text:style-name="T8">岁以打磨和组装为主，家长操作切割；</text:span><text:span text:style-name="T9">7-12</text:span><text:span text:style-name="T8">岁可在老师指导下尝试简单锯切）。将车身、车轮、车轴等部件逐步组合，体验从一块木头变成一辆立体小汽车的完整过程。</text:span></text:p>
      <text:p text:style-name="P7"><text:span text:style-name="Strong_20_Emphasis"><text:span text:style-name="T6">第</text:span></text:span><text:span text:style-name="Strong_20_Emphasis"><text:span text:style-name="T7">3</text:span></text:span><text:span text:style-name="Strong_20_Emphasis"><text:span text:style-name="T6">小时 </text:span></text:span><text:span text:style-name="Strong_20_Emphasis"><text:span text:style-name="T7">· </text:span></text:span><text:span text:style-name="Strong_20_Emphasis"><text:span text:style-name="T6">装饰彩绘 </text:span></text:span><text:span text:style-name="Strong_20_Emphasis"><text:span text:style-name="T7">&amp; </text:span></text:span><text:span text:style-name="Strong_20_Emphasis"><text:span text:style-name="T6">作品展示</text:span></text:span></text:p>
      <text:p text:style-name="P8"><text:soft-page-break/>小朋友用水性颜料为小汽车上色装饰，画上车灯、车窗、花纹等个性元素。全部完成后，每组家庭展示作品并分享创作心得，合影留念，带着自己的专属木制小汽车欢乐返程。</text:p>
      <text:h text:style-name="P2" text:outline-level="2">三、家长须知</text:h>
      <text:list text:style-name="L1">
        <text:list-item>
          <text:p text:style-name="P10"><text:span text:style-name="T8">活动提供：所有木料、工具、护具（围裙</text:span><text:span text:style-name="T9">+</text:span><text:span text:style-name="T8">护目镜）、颜料画笔</text:span></text:p>
        </text:list-item>
        <text:list-item>
          <text:p text:style-name="P11">家长需全程陪同，负责看护孩子操作安全</text:p>
        </text:list-item>
        <text:list-item>
          <text:p text:style-name="P11">建议穿着耐脏衣裤，女生建议扎起头发</text:p>
        </text:list-item>
        <text:list-item>
          <text:p text:style-name="P11">工坊提供饮水，可自带水杯</text:p>
        </text:list-item>
        <text:list-item>
          <text:p text:style-name="P11">成品小汽车可带走</text:p>
        </text:list-item>
      </text:list>
      <text:h text:style-name="P2" text:outline-level="2">四、合作说明</text:h>
      <text:p text:style-name="P9"><text:span text:style-name="T8">本场活动为【木工坊】与【理想汽车</text:span><text:span text:style-name="T9">4S</text:span><text:span text:style-name="T8">店】联合呈现，感谢理想汽车对本次亲子木工体验的大力支持，现场设有理想汽车展示及体验区，欢迎家长们在活动前后自由参观。</text:span></text:p>
      <text:h text:style-name="P2" text:outline-level="2">五、活动亮点</text:h>
      <text:list text:style-name="L2">
        <text:list-item>
          <text:p text:style-name="P12"><text:span text:style-name="Strong_20_Emphasis"><text:span text:style-name="T6">动手动脑</text:span></text:span><text:span text:style-name="T10">：从设计到成品全程参与，锻炼孩子专注力与动手能力</text:span></text:p>
        </text:list-item>
        <text:list-item>
          <text:p text:style-name="P12"><text:span text:style-name="Strong_20_Emphasis"><text:span text:style-name="T6">亲子协作</text:span></text:span><text:span text:style-name="T10">：家长与孩子一起锯、磨、拼、画，共享高质量陪伴时光</text:span></text:p>
        </text:list-item>
        <text:list-item>
          <text:p text:style-name="P12"><text:span text:style-name="Strong_20_Emphasis"><text:span text:style-name="T6">专属纪念</text:span></text:span><text:span text:style-name="T10">：亲手制作一辆独一无二的木制小汽车，成就感满满</text:span></text:p>
        </text:list-item>
        <text:list-item>
          <text:p text:style-name="P12"><text:span text:style-name="Strong_20_Emphasis"><text:span text:style-name="T6">安全有趣</text:span></text:span><text:span text:style-name="T10">：全程佩戴护具，工具按年龄分层使用，专业老师全程指导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思源宋体" svg:font-family="思源宋体" style:font-family-generic="system" style:font-pitch="variable"/>
    <style:font-face style:name="思源黑体" svg:font-family="思源黑体"/>
    <style:font-face style:name="思源黑体1" svg:font-family="思源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思源黑体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思源黑体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1" style:font-family-asian="思源黑体" style:font-family-generic-asian="system" style:font-pitch-asian="variable" style:font-size-asian="14pt" style:font-name-complex="思源黑体1" style:font-family-complex="思源黑体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思源黑体" style:font-family-complex="思源黑体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思源黑体" style:font-family-complex="思源黑体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思源黑体" style:font-family-complex="思源黑体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思源宋体" style:font-family-asian="思源宋体" style:font-family-generic-asian="system" style:font-pitch-asian="variable" style:font-size-asian="24pt" style:font-weight-asian="bold" style:font-name-complex="思源黑体1" style:font-family-complex="思源黑体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思源宋体" style:font-family-asian="思源宋体" style:font-family-generic-asian="system" style:font-pitch-asian="variable" style:font-size-asian="18pt" style:font-weight-asian="bold" style:font-name-complex="思源黑体1" style:font-family-complex="思源黑体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15:11:34.342886865</meta:creation-date>
    <dc:date>2026-06-25T15:18:13.523888996</dc:date>
    <meta:editing-duration>PT5M53S</meta:editing-duration>
    <meta:editing-cycles>2</meta:editing-cycles>
    <meta:generator>LibreOffice/26.2.4.2$Linux_X86_64 LibreOffice_project/0229ac93fcf0d7cbc6376066c6f35021cef002dc</meta:generator>
    <meta:document-statistic meta:table-count="1" meta:image-count="0" meta:object-count="0" meta:page-count="2" meta:paragraph-count="37" meta:word-count="773" meta:character-count="804" meta:non-whitespace-character-count="790"/>
  </office:meta>
</office:document-meta>
</file>